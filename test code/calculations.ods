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6118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4835in"/>
    </style:style>
    <style:style style:name="co6" style:family="table-column">
      <style:table-column-properties fo:break-before="auto" style:column-width="1.7728in"/>
    </style:style>
    <style:style style:name="co7" style:family="table-column">
      <style:table-column-properties fo:break-before="auto" style:column-width="1.3866in"/>
    </style:style>
    <style:style style:name="co8" style:family="table-column">
      <style:table-column-properties fo:break-before="auto" style:column-width="1.1154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map style:condition="is-true-formula(INDIRECT(ADDRESS(ROW();COLUMN()))&lt;INDIRECT(ADDRESS(ROW();COLUMN()+2)))" style:apply-style-name="Good" style:base-cell-address="Sheet1.K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Default"/>
        <table:table-column table:style-name="co1" table:number-columns-repeated="16368"/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office:value-type="string" calcext:value-type="string">
            <text:p>Earth radius.</text:p>
          </table:table-cell>
          <table:table-cell table:style-name="ce2" table:formula="of:=12756000/2" office:value-type="float" office:value="6378000" calcext:value-type="float">
            <text:p>6,378,000.00</text:p>
          </table:table-cell>
          <table:table-cell/>
          <table:table-cell office:value-type="string" calcext:value-type="string">
            <text:p>G</text:p>
          </table:table-cell>
          <table:table-cell table:style-name="ce2" table:formula="of:=9.81*[.B2]^2" office:value-type="float" office:value="399059852040000" calcext:value-type="float">
            <text:p>399,059,852,040,000.00</text:p>
          </table:table-cell>
          <table:table-cell table:number-columns-repeated="11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Notes</text:p>
          </table:table-cell>
          <table:table-cell/>
          <table:table-cell table:style-name="ce1"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Altitude (m)</text:p>
          </table:table-cell>
          <table:table-cell office:value-type="string" calcext:value-type="string">
            <text:p>Altitude Easy to Read</text:p>
          </table:table-cell>
          <table:table-cell office:value-type="string" calcext:value-type="string">
            <text:p>Max Tracking Speed (m/s)</text:p>
          </table:table-cell>
          <table:table-cell office:value-type="string" calcext:value-type="string">
            <text:p>Tracking Easy Read</text:p>
          </table:table-cell>
          <table:table-cell office:value-type="string" calcext:value-type="string">
            <text:p>Min. Orbital Period hr</text:p>
          </table:table-cell>
          <table:table-cell/>
          <table:table-cell office:value-type="string" calcext:value-type="string">
            <text:p>Orbital Period (hr)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2" table:formula="of:=ROUND(EXP([.F6]*[.$F$4]))+5" office:value-type="float" office:value="7" calcext:value-type="float">
            <text:p>7.00</text:p>
          </table:table-cell>
          <table:table-cell table:style-name="ce3" table:formula="of:=CONCATENATE(ROUND([.G6]/0.0254/12);&quot; ft&quot;)" office:value-type="string" office:string-value="23 ft" calcext:value-type="string">
            <text:p>23 ft</text:p>
          </table:table-cell>
          <table:table-cell table:style-name="ce2" table:formula="of:=[.G6]*[.$C$9]" office:value-type="float" office:value="0.439822971502571" calcext:value-type="float">
            <text:p>0.44</text:p>
          </table:table-cell>
          <table:table-cell table:style-name="ce2" table:formula="of:=CONCATENATE(ROUND([.I6]*3600/5280/0.0254/12);&quot; mph&quot;)" office:value-type="string" office:string-value="1 mph" calcext:value-type="string">
            <text:p>1 mph</text:p>
          </table:table-cell>
          <table:table-cell table:style-name="ce4"/>
          <table:table-cell table:style-name="ce2"/>
          <table:table-cell table:style-name="ce2" table:formula="of:=1/(([.N6]*([.G6]+[.$B$2]))^0.5/(2*PI()*([.$B$2]+[.G6])))/3600" office:value-type="float" office:value="1.40729724129417" calcext:value-type="float">
            <text:p>1.41</text:p>
          </table:table-cell>
          <table:table-cell table:style-name="ce2" table:formula="of:=[.$E$2]/([.G6]+[.$B$2])^2" office:value-type="float" office:value="9.8099784666394" calcext:value-type="float">
            <text:p>9.81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servo spe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ROUND(EXP([.F7]*[.$F$4]))+5" office:value-type="float" office:value="10" calcext:value-type="float">
            <text:p>10.00</text:p>
          </table:table-cell>
          <table:table-cell table:style-name="ce3" table:formula="of:=CONCATENATE(ROUND([.G7]/0.0254/12);&quot; ft&quot;)" office:value-type="string" office:string-value="33 ft" calcext:value-type="string">
            <text:p>33 ft</text:p>
          </table:table-cell>
          <table:table-cell table:style-name="ce2" table:formula="of:=[.G7]*[.$C$9]" office:value-type="float" office:value="0.628318530717959" calcext:value-type="float">
            <text:p>0.63</text:p>
          </table:table-cell>
          <table:table-cell table:style-name="ce2" table:formula="of:=CONCATENATE(ROUND([.I7]*3600/5280/0.0254/12);&quot; mph&quot;)" office:value-type="string" office:string-value="1 mph" calcext:value-type="string">
            <text:p>1 mph</text:p>
          </table:table-cell>
          <table:table-cell table:style-name="ce4"/>
          <table:table-cell table:style-name="ce2"/>
          <table:table-cell table:style-name="ce2" table:formula="of:=1/(([.N7]*([.G7]+[.$B$2]))^0.5/(2*PI()*([.$B$2]+[.G7])))/3600" office:value-type="float" office:value="1.40729823421223" calcext:value-type="float">
            <text:p>1.41</text:p>
          </table:table-cell>
          <table:table-cell table:style-name="ce2" table:formula="of:=[.$E$2]/([.G7]+[.$B$2])^2" office:value-type="float" office:value="9.80996923807799" calcext:value-type="float">
            <text:p>9.81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2"/>
          <table:table-cell table:formula="of:=[.C7]/60" office:value-type="float" office:value="0.01" calcext:value-type="float">
            <text:p>0.01</text:p>
          </table:table-cell>
          <table:table-cell office:value-type="string" calcext:value-type="string">
            <text:p>rp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ROUND(EXP([.F8]*[.$F$4]))+5" office:value-type="float" office:value="16" calcext:value-type="float">
            <text:p>16.00</text:p>
          </table:table-cell>
          <table:table-cell table:style-name="ce3" table:formula="of:=CONCATENATE(ROUND([.G8]/0.0254/12);&quot; ft&quot;)" office:value-type="string" office:string-value="52 ft" calcext:value-type="string">
            <text:p>52 ft</text:p>
          </table:table-cell>
          <table:table-cell table:style-name="ce2" table:formula="of:=[.G8]*[.$C$9]" office:value-type="float" office:value="1.00530964914873" calcext:value-type="float">
            <text:p>1.01</text:p>
          </table:table-cell>
          <table:table-cell table:style-name="ce2" table:formula="of:=CONCATENATE(ROUND([.I8]*3600/5280/0.0254/12);&quot; mph&quot;)" office:value-type="string" office:string-value="2 mph" calcext:value-type="string">
            <text:p>2 mph</text:p>
          </table:table-cell>
          <table:table-cell table:style-name="ce4"/>
          <table:table-cell table:style-name="ce2"/>
          <table:table-cell table:style-name="ce2" table:formula="of:=1/(([.N8]*([.G8]+[.$B$2]))^0.5/(2*PI()*([.$B$2]+[.G8])))/3600" office:value-type="float" office:value="1.40730022004905" calcext:value-type="float">
            <text:p>1.41</text:p>
          </table:table-cell>
          <table:table-cell table:style-name="ce2" table:formula="of:=[.$E$2]/([.G8]+[.$B$2])^2" office:value-type="float" office:value="9.80995078099424" calcext:value-type="float">
            <text:p>9.81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2"/>
          <table:table-cell table:formula="of:=[.C8]*2*PI()" office:value-type="float" office:value="0.0628318530717959" calcext:value-type="float">
            <text:p>0.0628318530717959</text:p>
          </table:table-cell>
          <table:table-cell office:value-type="string" calcext:value-type="string">
            <text:p>rad/s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ROUND(EXP([.F9]*[.$F$4]))+5" office:value-type="float" office:value="29" calcext:value-type="float">
            <text:p>29.00</text:p>
          </table:table-cell>
          <table:table-cell table:style-name="ce3" table:formula="of:=CONCATENATE(ROUND([.G9]/0.0254/12);&quot; ft&quot;)" office:value-type="string" office:string-value="95 ft" calcext:value-type="string">
            <text:p>95 ft</text:p>
          </table:table-cell>
          <table:table-cell table:style-name="ce2" table:formula="of:=[.G9]*[.$C$9]" office:value-type="float" office:value="1.82212373908208" calcext:value-type="float">
            <text:p>1.82</text:p>
          </table:table-cell>
          <table:table-cell table:style-name="ce2" table:formula="of:=CONCATENATE(ROUND([.I9]*3600/5280/0.0254/12);&quot; mph&quot;)" office:value-type="string" office:string-value="4 mph" calcext:value-type="string">
            <text:p>4 mph</text:p>
          </table:table-cell>
          <table:table-cell table:style-name="ce4"/>
          <table:table-cell table:style-name="ce2"/>
          <table:table-cell table:style-name="ce2" table:formula="of:=1/(([.N9]*([.G9]+[.$B$2]))^0.5/(2*PI()*([.$B$2]+[.G9])))/3600" office:value-type="float" office:value="1.4073045226987" calcext:value-type="float">
            <text:p>1.41</text:p>
          </table:table-cell>
          <table:table-cell table:style-name="ce2" table:formula="of:=[.$E$2]/([.G9]+[.$B$2])^2" office:value-type="float" office:value="9.80991079082481" calcext:value-type="float">
            <text:p>9.81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" table:formula="of:=ROUND(EXP([.F10]*[.$F$4]))+5" office:value-type="float" office:value="57" calcext:value-type="float">
            <text:p>57.00</text:p>
          </table:table-cell>
          <table:table-cell table:style-name="ce3" table:formula="of:=CONCATENATE(ROUND([.G10]/0.0254/12);&quot; ft&quot;)" office:value-type="string" office:string-value="187 ft" calcext:value-type="string">
            <text:p>187 ft</text:p>
          </table:table-cell>
          <table:table-cell table:style-name="ce2" table:formula="of:=[.G10]*[.$C$9]" office:value-type="float" office:value="3.58141562509236" calcext:value-type="float">
            <text:p>3.58</text:p>
          </table:table-cell>
          <table:table-cell table:style-name="ce2" table:formula="of:=CONCATENATE(ROUND([.I10]*3600/5280/0.0254/12);&quot; mph&quot;)" office:value-type="string" office:string-value="8 mph" calcext:value-type="string">
            <text:p>8 mph</text:p>
          </table:table-cell>
          <table:table-cell table:style-name="ce4"/>
          <table:table-cell table:style-name="ce2"/>
          <table:table-cell table:style-name="ce2" table:formula="of:=1/(([.N10]*([.G10]+[.$B$2]))^0.5/(2*PI()*([.$B$2]+[.G10])))/3600" office:value-type="float" office:value="1.40731378995898" calcext:value-type="float">
            <text:p>1.41</text:p>
          </table:table-cell>
          <table:table-cell table:style-name="ce2" table:formula="of:=[.$E$2]/([.G10]+[.$B$2])^2" office:value-type="float" office:value="9.8098246589827" calcext:value-type="float">
            <text:p>9.81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miles</text:p>
          </table:table-cell>
          <table:table-cell office:value-type="float" office:value="6" calcext:value-type="float">
            <text:p>6</text:p>
          </table:table-cell>
          <table:table-cell table:style-name="ce2" table:formula="of:=ROUND(EXP([.F11]*[.$F$4]))+5" office:value-type="float" office:value="119" calcext:value-type="float">
            <text:p>119.00</text:p>
          </table:table-cell>
          <table:table-cell table:style-name="ce3" table:formula="of:=CONCATENATE(ROUND([.G11]/0.0254/12);&quot; ft&quot;)" office:value-type="string" office:string-value="390 ft" calcext:value-type="string">
            <text:p>390 ft</text:p>
          </table:table-cell>
          <table:table-cell table:style-name="ce2" table:formula="of:=[.G11]*[.$C$9]" office:value-type="float" office:value="7.47699051554371" calcext:value-type="float">
            <text:p>7.48</text:p>
          </table:table-cell>
          <table:table-cell table:style-name="ce2" table:formula="of:=CONCATENATE(ROUND([.I11]*3600/5280/0.0254/12);&quot; mph&quot;)" office:value-type="string" office:string-value="17 mph" calcext:value-type="string">
            <text:p>17 mph</text:p>
          </table:table-cell>
          <table:table-cell table:style-name="ce4"/>
          <table:table-cell table:style-name="ce2"/>
          <table:table-cell table:style-name="ce2" table:formula="of:=1/(([.N11]*([.G11]+[.$B$2]))^0.5/(2*PI()*([.$B$2]+[.G11])))/3600" office:value-type="float" office:value="1.40733431039342" calcext:value-type="float">
            <text:p>1.41</text:p>
          </table:table-cell>
          <table:table-cell table:style-name="ce2" table:formula="of:=[.$E$2]/([.G11]+[.$B$2])^2" office:value-type="float" office:value="9.80963394251199" calcext:value-type="float">
            <text:p>9.81</text:p>
          </table:table-cell>
          <table:table-cell table:style-name="Default"/>
          <table:table-cell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Iss orbit max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m</text:p>
          </table:table-cell>
          <table:table-cell table:style-name="ce2" table:formula="of:=[.C12]/0.0254/12/5280" office:value-type="float" office:value="248.548476894934" calcext:value-type="float">
            <text:p>248.55</text:p>
          </table:table-cell>
          <table:table-cell office:value-type="float" office:value="7" calcext:value-type="float">
            <text:p>7</text:p>
          </table:table-cell>
          <table:table-cell table:style-name="ce2" table:formula="of:=ROUND(EXP([.F12]*[.$F$4]))+5" office:value-type="float" office:value="257" calcext:value-type="float">
            <text:p>257.00</text:p>
          </table:table-cell>
          <table:table-cell table:style-name="ce3" table:formula="of:=CONCATENATE(ROUND([.G12]/0.0254/12);&quot; ft&quot;)" office:value-type="string" office:string-value="843 ft" calcext:value-type="string">
            <text:p>843 ft</text:p>
          </table:table-cell>
          <table:table-cell table:style-name="ce2" table:formula="of:=[.G12]*[.$C$9]" office:value-type="float" office:value="16.1477862394515" calcext:value-type="float">
            <text:p>16.15</text:p>
          </table:table-cell>
          <table:table-cell table:style-name="ce2" table:formula="of:=CONCATENATE(ROUND([.I12]*3600/5280/0.0254/12);&quot; mph&quot;)" office:value-type="string" office:string-value="36 mph" calcext:value-type="string">
            <text:p>36 mph</text:p>
          </table:table-cell>
          <table:table-cell table:style-name="ce4"/>
          <table:table-cell table:style-name="ce2"/>
          <table:table-cell table:style-name="ce2" table:formula="of:=1/(([.N12]*([.G12]+[.$B$2]))^0.5/(2*PI()*([.$B$2]+[.G12])))/3600" office:value-type="float" office:value="1.40737998526684" calcext:value-type="float">
            <text:p>1.41</text:p>
          </table:table-cell>
          <table:table-cell table:style-name="ce2" table:formula="of:=[.$E$2]/([.G12]+[.$B$2])^2" office:value-type="float" office:value="9.80920946452704" calcext:value-type="float">
            <text:p>9.81</text:p>
          </table:table-cell>
          <table:table-cell table:style-name="ce5" office:value-type="string" calcext:value-type="string">
            <text:p>Aircraft</text:p>
          </table:table-cell>
          <table:table-cell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Iss orbit mi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</text:p>
          </table:table-cell>
          <table:table-cell table:style-name="ce2" table:formula="of:=[.C13]/0.0254/12/5280" office:value-type="float" office:value="155.342798059334" calcext:value-type="float">
            <text:p>155.34</text:p>
          </table:table-cell>
          <table:table-cell office:value-type="float" office:value="8" calcext:value-type="float">
            <text:p>8</text:p>
          </table:table-cell>
          <table:table-cell table:style-name="ce2" table:formula="of:=ROUND(EXP([.F13]*[.$F$4]))+5" office:value-type="float" office:value="561" calcext:value-type="float">
            <text:p>561.00</text:p>
          </table:table-cell>
          <table:table-cell table:style-name="ce3" table:formula="of:=CONCATENATE(ROUND([.G13]/0.0254/12);&quot; ft&quot;)" office:value-type="string" office:string-value="1841 ft" calcext:value-type="string">
            <text:p>1841 ft</text:p>
          </table:table-cell>
          <table:table-cell table:style-name="ce2" table:formula="of:=[.G13]*[.$C$9]" office:value-type="float" office:value="35.2486695732775" calcext:value-type="float">
            <text:p>35.25</text:p>
          </table:table-cell>
          <table:table-cell table:style-name="ce2" table:formula="of:=CONCATENATE(ROUND([.I13]*3600/5280/0.0254/12);&quot; mph&quot;)" office:value-type="string" office:string-value="79 mph" calcext:value-type="string">
            <text:p>79 mph</text:p>
          </table:table-cell>
          <table:table-cell table:style-name="ce4"/>
          <table:table-cell table:style-name="ce2"/>
          <table:table-cell table:style-name="ce2" table:formula="of:=1/(([.N13]*([.G13]+[.$B$2]))^0.5/(2*PI()*([.$B$2]+[.G13])))/3600" office:value-type="float" office:value="1.40748060412246" calcext:value-type="float">
            <text:p>1.41</text:p>
          </table:table-cell>
          <table:table-cell table:style-name="ce2" table:formula="of:=[.$E$2]/([.G13]+[.$B$2])^2" office:value-type="float" office:value="9.80827447978152" calcext:value-type="float">
            <text:p>9.81</text:p>
          </table:table-cell>
          <table:table-cell table:style-name="ce5" office:value-type="string" calcext:value-type="string">
            <text:p>Aircraft</text:p>
          </table:table-cell>
          <table:table-cell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aircraft</text:p>
          </table:table-cell>
          <table:table-cell table:formula="of:=36000*0.0254*12" office:value-type="float" office:value="10972.8" calcext:value-type="float">
            <text:p>10972.8</text:p>
          </table:table-cell>
          <table:table-cell office:value-type="string" calcext:value-type="string">
            <text:p>m</text:p>
          </table:table-cell>
          <table:table-cell table:style-name="ce2" table:formula="of:=[.C14]/0.0254/12/5280" office:value-type="float" office:value="6.81818181818182" calcext:value-type="float">
            <text:p>6.82</text:p>
          </table:table-cell>
          <table:table-cell office:value-type="float" office:value="9" calcext:value-type="float">
            <text:p>9</text:p>
          </table:table-cell>
          <table:table-cell table:style-name="ce2" table:formula="of:=ROUND(EXP([.F14]*[.$F$4]))+5" office:value-type="float" office:value="1229" calcext:value-type="float">
            <text:p>1,229.00</text:p>
          </table:table-cell>
          <table:table-cell table:style-name="ce3" table:formula="of:=CONCATENATE(ROUND([.G14]/0.0254/12);&quot; ft&quot;)" office:value-type="string" office:string-value="4032 ft" calcext:value-type="string">
            <text:p>4032 ft</text:p>
          </table:table-cell>
          <table:table-cell table:style-name="ce2" table:formula="of:=[.G14]*[.$C$9]" office:value-type="float" office:value="77.2203474252371" calcext:value-type="float">
            <text:p>77.22</text:p>
          </table:table-cell>
          <table:table-cell table:style-name="ce2" table:formula="of:=CONCATENATE(ROUND([.I14]*3600/5280/0.0254/12);&quot; mph&quot;)" office:value-type="string" office:string-value="173 mph" calcext:value-type="string">
            <text:p>173 mph</text:p>
          </table:table-cell>
          <table:table-cell table:style-name="ce4"/>
          <table:table-cell table:style-name="ce2"/>
          <table:table-cell table:style-name="ce2" table:formula="of:=1/(([.N14]*([.G14]+[.$B$2]))^0.5/(2*PI()*([.$B$2]+[.G14])))/3600" office:value-type="float" office:value="1.40770170924135" calcext:value-type="float">
            <text:p>1.41</text:p>
          </table:table-cell>
          <table:table-cell table:style-name="ce2" table:formula="of:=[.$E$2]/([.G14]+[.$B$2])^2" office:value-type="float" office:value="9.80622044337353" calcext:value-type="float">
            <text:p>9.81</text:p>
          </table:table-cell>
          <table:table-cell table:style-name="ce5" office:value-type="string" calcext:value-type="string">
            <text:p>Aircraft</text:p>
          </table:table-cell>
          <table:table-cell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Karmen Lin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</text:p>
          </table:table-cell>
          <table:table-cell table:style-name="ce2" table:formula="of:=[.C15]/0.0254/12/5280" office:value-type="float" office:value="62.1371192237334" calcext:value-type="float">
            <text:p>62.14</text:p>
          </table:table-cell>
          <table:table-cell office:value-type="float" office:value="10" calcext:value-type="float">
            <text:p>10</text:p>
          </table:table-cell>
          <table:table-cell table:style-name="ce2" table:formula="of:=ROUND(EXP([.F15]*[.$F$4]))+5" office:value-type="float" office:value="2702" calcext:value-type="float">
            <text:p>2,702.00</text:p>
          </table:table-cell>
          <table:table-cell table:style-name="ce3" table:formula="of:=CONCATENATE(ROUND([.G15]/0.0254/12);&quot; ft&quot;)" office:value-type="string" office:string-value="8865 ft" calcext:value-type="string">
            <text:p>8865 ft</text:p>
          </table:table-cell>
          <table:table-cell table:style-name="ce2" table:formula="of:=[.G15]*[.$C$9]" office:value-type="float" office:value="169.771666999992" calcext:value-type="float">
            <text:p>169.77</text:p>
          </table:table-cell>
          <table:table-cell table:style-name="ce2" table:formula="of:=CONCATENATE(ROUND([.I15]*3600/5280/0.0254/12);&quot; mph&quot;)" office:value-type="string" office:string-value="380 mph" calcext:value-type="string">
            <text:p>380 mph</text:p>
          </table:table-cell>
          <table:table-cell table:style-name="ce4"/>
          <table:table-cell table:style-name="ce2"/>
          <table:table-cell table:style-name="ce2" table:formula="of:=1/(([.N15]*([.G15]+[.$B$2]))^0.5/(2*PI()*([.$B$2]+[.G15])))/3600" office:value-type="float" office:value="1.40818930679697" calcext:value-type="float">
            <text:p>1.41</text:p>
          </table:table-cell>
          <table:table-cell table:style-name="ce2" table:formula="of:=[.$E$2]/([.G15]+[.$B$2])^2" office:value-type="float" office:value="9.80169338806441" calcext:value-type="float">
            <text:p>9.80</text:p>
          </table:table-cell>
          <table:table-cell table:style-name="ce5" office:value-type="string" calcext:value-type="string">
            <text:p>Aircraft</text:p>
          </table:table-cell>
          <table:table-cell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Propeller Craft Max</text:p>
          </table:table-cell>
          <table:table-cell table:formula="of:=15000*0.0254*12" office:value-type="float" office:value="4572" calcext:value-type="float">
            <text:p>4572</text:p>
          </table:table-cell>
          <table:table-cell office:value-type="string" calcext:value-type="string">
            <text:p>m</text:p>
          </table:table-cell>
          <table:table-cell table:style-name="ce2" table:formula="of:=[.C16]/0.0254/12/5280" office:value-type="float" office:value="2.84090909090909" calcext:value-type="float">
            <text:p>2.84</text:p>
          </table:table-cell>
          <table:table-cell office:value-type="float" office:value="11" calcext:value-type="float">
            <text:p>11</text:p>
          </table:table-cell>
          <table:table-cell table:style-name="ce2" table:formula="of:=ROUND(EXP([.F16]*[.$F$4]))+5" office:value-type="float" office:value="5948" calcext:value-type="float">
            <text:p>5,948.00</text:p>
          </table:table-cell>
          <table:table-cell table:style-name="ce3" table:formula="of:=CONCATENATE(ROUND([.G16]/0.0254/12);&quot; ft&quot;)" office:value-type="string" office:string-value="19514 ft" calcext:value-type="string">
            <text:p>19514 ft</text:p>
          </table:table-cell>
          <table:table-cell table:style-name="ce2" table:formula="of:=[.G16]*[.$C$9]" office:value-type="float" office:value="373.723862071042" calcext:value-type="float">
            <text:p>373.72</text:p>
          </table:table-cell>
          <table:table-cell table:style-name="ce2" table:formula="of:=CONCATENATE(ROUND([.I16]*3600/5280/0.0254/12);&quot; mph&quot;)" office:value-type="string" office:string-value="836 mph" calcext:value-type="string">
            <text:p>836 mph</text:p>
          </table:table-cell>
          <table:table-cell table:style-name="ce4"/>
          <table:table-cell table:style-name="ce2"/>
          <table:table-cell table:style-name="ce2" table:formula="of:=1/(([.N16]*([.G16]+[.$B$2]))^0.5/(2*PI()*([.$B$2]+[.G16])))/3600" office:value-type="float" office:value="1.40926400761667" calcext:value-type="float">
            <text:p>1.41</text:p>
          </table:table-cell>
          <table:table-cell table:style-name="ce2" table:formula="of:=[.$E$2]/([.G16]+[.$B$2])^2" office:value-type="float" office:value="9.79172832944044" calcext:value-type="float">
            <text:p>9.79</text:p>
          </table:table-cell>
          <table:table-cell table:style-name="ce5" office:value-type="string" calcext:value-type="string">
            <text:p>Aircraft</text:p>
          </table:table-cell>
          <table:table-cell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geostationary orbit</text:p>
          </table:table-cell>
          <table:table-cell office:value-type="float" office:value="35786000" calcext:value-type="float">
            <text:p>35786000</text:p>
          </table:table-cell>
          <table:table-cell office:value-type="string" calcext:value-type="string">
            <text:p>m</text:p>
          </table:table-cell>
          <table:table-cell table:style-name="ce2" table:formula="of:=[.C17]/0.0254/12/5280" office:value-type="float" office:value="22236.3894854052" calcext:value-type="float">
            <text:p>22,236.39</text:p>
          </table:table-cell>
          <table:table-cell office:value-type="float" office:value="12" calcext:value-type="float">
            <text:p>12</text:p>
          </table:table-cell>
          <table:table-cell table:style-name="ce2" table:formula="of:=ROUND(EXP([.F17]*[.$F$4]))+5" office:value-type="float" office:value="13100" calcext:value-type="float">
            <text:p>13,100.00</text:p>
          </table:table-cell>
          <table:table-cell table:style-name="ce3" table:formula="of:=CONCATENATE(ROUND([.G17]/0.0254/12/5280);&quot; mi&quot;)" office:value-type="string" office:string-value="8 mi" calcext:value-type="string">
            <text:p>8 mi</text:p>
          </table:table-cell>
          <table:table-cell table:style-name="ce2" table:formula="of:=[.G17]*[.$C$9]" office:value-type="float" office:value="823.097275240526" calcext:value-type="float">
            <text:p>823.10</text:p>
          </table:table-cell>
          <table:table-cell table:style-name="ce2" table:formula="of:=CONCATENATE(ROUND([.I17]*3600/5280/0.0254/12);&quot; mph&quot;)" office:value-type="string" office:string-value="1841 mph" calcext:value-type="string">
            <text:p>1841 mph</text:p>
          </table:table-cell>
          <table:table-cell table:style-name="ce4"/>
          <table:table-cell table:style-name="ce2"/>
          <table:table-cell table:style-name="ce2" table:formula="of:=1/(([.N17]*([.G17]+[.$B$2]))^0.5/(2*PI()*([.$B$2]+[.G17])))/3600" office:value-type="float" office:value="1.41163288935854" calcext:value-type="float">
            <text:p>1.41</text:p>
          </table:table-cell>
          <table:table-cell table:style-name="ce2" table:formula="of:=[.$E$2]/([.G17]+[.$B$2])^2" office:value-type="float" office:value="9.76982560314512" calcext:value-type="float">
            <text:p>9.77</text:p>
          </table:table-cell>
          <table:table-cell table:style-name="ce5" office:value-type="string" calcext:value-type="string">
            <text:p>Commercial Jets</text:p>
          </table:table-cell>
          <table:table-cell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2" table:formula="of:=ROUND(EXP([.F18]*[.$F$4]))+5" office:value-type="float" office:value="28859" calcext:value-type="float">
            <text:p>28,859.00</text:p>
          </table:table-cell>
          <table:table-cell table:style-name="ce3" table:formula="of:=CONCATENATE(ROUND([.G18]/0.0254/12/5280);&quot; mi&quot;)" office:value-type="string" office:string-value="18 mi" calcext:value-type="string">
            <text:p>18 mi</text:p>
          </table:table-cell>
          <table:table-cell table:style-name="ce2" table:formula="of:=[.G18]*[.$C$9]" office:value-type="float" office:value="1813.26444779896" calcext:value-type="float">
            <text:p>1,813.26</text:p>
          </table:table-cell>
          <table:table-cell table:style-name="ce2" table:formula="of:=CONCATENATE(ROUND([.I18]*3600/5280/0.0254/12);&quot; mph&quot;)" office:value-type="string" office:string-value="4056 mph" calcext:value-type="string">
            <text:p>4056 mph</text:p>
          </table:table-cell>
          <table:table-cell table:style-name="ce4"/>
          <table:table-cell table:style-name="ce2"/>
          <table:table-cell table:style-name="ce2" table:formula="of:=1/(([.N18]*([.G18]+[.$B$2]))^0.5/(2*PI()*([.$B$2]+[.G18])))/3600" office:value-type="float" office:value="1.41685725537227" calcext:value-type="float">
            <text:p>1.42</text:p>
          </table:table-cell>
          <table:table-cell table:style-name="ce2" table:formula="of:=[.$E$2]/([.G18]+[.$B$2])^2" office:value-type="float" office:value="9.72182288290791" calcext:value-type="float">
            <text:p>9.72</text:p>
          </table:table-cell>
          <table:table-cell table:style-name="Default"/>
          <table:table-cell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2" table:formula="of:=ROUND(EXP([.F19]*[.$F$4]))+5" office:value-type="float" office:value="63582" calcext:value-type="float">
            <text:p>63,582.00</text:p>
          </table:table-cell>
          <table:table-cell table:style-name="ce3" table:formula="of:=CONCATENATE(ROUND([.G19]/0.0254/12/5280);&quot; mi&quot;)" office:value-type="string" office:string-value="40 mi" calcext:value-type="string">
            <text:p>40 mi</text:p>
          </table:table-cell>
          <table:table-cell table:style-name="ce2" table:formula="of:=[.G19]*[.$C$9]" office:value-type="float" office:value="3994.97488201093" calcext:value-type="float">
            <text:p>3,994.97</text:p>
          </table:table-cell>
          <table:table-cell table:style-name="ce2" table:formula="of:=CONCATENATE(ROUND([.I19]*3600/5280/0.0254/12);&quot; mph&quot;)" office:value-type="string" office:string-value="8937 mph" calcext:value-type="string">
            <text:p>8937 mph</text:p>
          </table:table-cell>
          <table:table-cell table:style-name="ce4"/>
          <table:table-cell table:style-name="ce2"/>
          <table:table-cell table:style-name="ce2" table:formula="of:=1/(([.N19]*([.G19]+[.$B$2]))^0.5/(2*PI()*([.$B$2]+[.G19])))/3600" office:value-type="float" office:value="1.4283911753957" calcext:value-type="float">
            <text:p>1.43</text:p>
          </table:table-cell>
          <table:table-cell table:style-name="ce2" table:formula="of:=[.$E$2]/([.G19]+[.$B$2])^2" office:value-type="float" office:value="9.61729544625458" calcext:value-type="float">
            <text:p>9.62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2" table:formula="of:=ROUND(EXP([.F20]*[.$F$4]))+5" office:value-type="float" office:value="140089" calcext:value-type="float">
            <text:p>140,089.00</text:p>
          </table:table-cell>
          <table:table-cell table:style-name="ce3" table:formula="of:=CONCATENATE(ROUND([.G20]/0.0254/12/5280);&quot; mi&quot;)" office:value-type="string" office:string-value="87 mi" calcext:value-type="string">
            <text:p>87 mi</text:p>
          </table:table-cell>
          <table:table-cell table:style-name="ce2" table:formula="of:=[.G20]*[.$C$9]" office:value-type="float" office:value="8802.05146497481" calcext:value-type="float">
            <text:p>8,802.05</text:p>
          </table:table-cell>
          <table:table-cell table:style-name="ce2" table:formula="of:=CONCATENATE(ROUND([.I20]*3600/5280/0.0254/12);&quot; mph&quot;)" office:value-type="string" office:string-value="19690 mph" calcext:value-type="string">
            <text:p>19690 mph</text:p>
          </table:table-cell>
          <table:table-cell table:style-name="ce4" table:formula="of:=2*PI()*([.G20]+[.$B$2])/([.I20])/3600" office:value-type="float" office:value="1.29244999805679" calcext:value-type="float">
            <text:p>1.29</text:p>
          </table:table-cell>
          <table:table-cell table:style-name="ce2"/>
          <table:table-cell table:style-name="ce2" table:formula="of:=1/(([.N20]*([.G20]+[.$B$2]))^0.5/(2*PI()*([.$B$2]+[.G20])))/3600" office:value-type="float" office:value="1.45391420008038" calcext:value-type="float">
            <text:p>1.45</text:p>
          </table:table-cell>
          <table:table-cell table:style-name="ce2" table:formula="of:=[.$E$2]/([.G20]+[.$B$2])^2" office:value-type="float" office:value="9.3928516866951" calcext:value-type="float">
            <text:p>9.39</text:p>
          </table:table-cell>
          <table:table-cell office:value-type="string" calcext:value-type="string">
            <text:p>Karmen line</text:p>
          </table:table-cell>
          <table:table-cell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2" table:formula="of:=ROUND(EXP([.F21]*[.$F$4]))+5" office:value-type="float" office:value="308666" calcext:value-type="float">
            <text:p>308,666.00</text:p>
          </table:table-cell>
          <table:table-cell table:style-name="ce3" table:formula="of:=CONCATENATE(ROUND([.G21]/0.0254/12/5280);&quot; mi&quot;)" office:value-type="string" office:string-value="192 mi" calcext:value-type="string">
            <text:p>192 mi</text:p>
          </table:table-cell>
          <table:table-cell table:style-name="ce2" table:formula="of:=[.G21]*[.$C$9]" office:value-type="float" office:value="19394.0567602589" calcext:value-type="float">
            <text:p>19,394.06</text:p>
          </table:table-cell>
          <table:table-cell table:style-name="ce2" table:formula="of:=CONCATENATE(ROUND([.I21]*3600/5280/0.0254/12);&quot; mph&quot;)" office:value-type="string" office:string-value="43383 mph" calcext:value-type="string">
            <text:p>43383 mph</text:p>
          </table:table-cell>
          <table:table-cell table:style-name="ce4" table:formula="of:=2*PI()*([.G21]+[.$B$2])/([.I21])/3600" office:value-type="float" office:value="0.601753099538732" calcext:value-type="float">
            <text:p>0.60</text:p>
          </table:table-cell>
          <table:table-cell table:style-name="ce2"/>
          <table:table-cell table:style-name="ce2" table:formula="of:=1/(([.N21]*([.G21]+[.$B$2]))^0.5/(2*PI()*([.$B$2]+[.G21])))/3600" office:value-type="float" office:value="1.51068109710745" calcext:value-type="float">
            <text:p>1.51</text:p>
          </table:table-cell>
          <table:table-cell table:style-name="ce2" table:formula="of:=[.$E$2]/([.G21]+[.$B$2])^2" office:value-type="float" office:value="8.92521683334683" calcext:value-type="float">
            <text:p>8.93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Max servo spe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" table:formula="of:=ROUND(EXP([.F22]*[.$F$4]))+5" office:value-type="float" office:value="680108" calcext:value-type="float">
            <text:p>680,108.00</text:p>
          </table:table-cell>
          <table:table-cell table:style-name="ce3" table:formula="of:=CONCATENATE(ROUND([.G22]/0.0254/12/5280);&quot; mi&quot;)" office:value-type="string" office:string-value="423 mi" calcext:value-type="string">
            <text:p>423 mi</text:p>
          </table:table-cell>
          <table:table-cell table:style-name="ce2" table:formula="of:=[.G22]*[.$C$9]" office:value-type="float" office:value="42732.445928953" calcext:value-type="float">
            <text:p>42,732.45</text:p>
          </table:table-cell>
          <table:table-cell table:style-name="ce2" table:formula="of:=CONCATENATE(ROUND([.I22]*3600/5280/0.0254/12);&quot; mph&quot;)" office:value-type="string" office:string-value="95590 mph" calcext:value-type="string">
            <text:p>95590 mph</text:p>
          </table:table-cell>
          <table:table-cell table:style-name="ce4" table:formula="of:=2*PI()*([.G22]+[.$B$2])/([.I22])/3600" office:value-type="float" office:value="0.288275620277302" calcext:value-type="float">
            <text:p>0.29</text:p>
          </table:table-cell>
          <table:table-cell table:style-name="ce2"/>
          <table:table-cell table:style-name="ce2" table:formula="of:=1/(([.N22]*([.G22]+[.$B$2]))^0.5/(2*PI()*([.$B$2]+[.G22])))/3600" office:value-type="float" office:value="1.638290067195" calcext:value-type="float">
            <text:p>1.64</text:p>
          </table:table-cell>
          <table:table-cell table:style-name="ce2" table:formula="of:=[.$E$2]/([.G22]+[.$B$2])^2" office:value-type="float" office:value="8.01053345036333" calcext:value-type="float">
            <text:p>8.01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2" table:formula="of:=ROUND(EXP([.F23]*[.$F$4]))+5" office:value-type="float" office:value="1498542" calcext:value-type="float">
            <text:p>1,498,542.00</text:p>
          </table:table-cell>
          <table:table-cell table:style-name="ce3" table:formula="of:=CONCATENATE(ROUND([.G23]/0.0254/12/5280);&quot; mi&quot;)" office:value-type="string" office:string-value="931 mi" calcext:value-type="string">
            <text:p>931 mi</text:p>
          </table:table-cell>
          <table:table-cell table:style-name="ce2" table:formula="of:=[.G23]*[.$C$9]" office:value-type="float" office:value="94156.1707659151" calcext:value-type="float">
            <text:p>94,156.17</text:p>
          </table:table-cell>
          <table:table-cell table:style-name="ce2" table:formula="of:=CONCATENATE(ROUND([.I23]*3600/5280/0.0254/12);&quot; mph&quot;)" office:value-type="string" office:string-value="210621 mph" calcext:value-type="string">
            <text:p>210621 mph</text:p>
          </table:table-cell>
          <table:table-cell table:style-name="ce4" table:formula="of:=2*PI()*([.G23]+[.$B$2])/([.I23])/3600" office:value-type="float" office:value="0.146003804586947" calcext:value-type="float">
            <text:p>0.15</text:p>
          </table:table-cell>
          <table:table-cell table:style-name="ce2"/>
          <table:table-cell table:style-name="ce2" table:formula="of:=1/(([.N23]*([.G23]+[.$B$2]))^0.5/(2*PI()*([.$B$2]+[.G23])))/3600" office:value-type="float" office:value="1.93135335652139" calcext:value-type="float">
            <text:p>1.93</text:p>
          </table:table-cell>
          <table:table-cell table:style-name="ce2" table:formula="of:=[.$E$2]/([.G23]+[.$B$2])^2" office:value-type="float" office:value="6.43230828505435" calcext:value-type="float">
            <text:p>6.43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Maximum servo gear ratio</text:p>
          </table:table-cell>
          <table:table-cell table:formula="of:=[.C22]/[.C7]" office:value-type="float" office:value="25" calcext:value-type="float">
            <text:p>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" table:formula="of:=ROUND(EXP([.F24]*[.$F$4]))+5" office:value-type="float" office:value="3301877" calcext:value-type="float">
            <text:p>3,301,877.00</text:p>
          </table:table-cell>
          <table:table-cell table:style-name="ce3" table:formula="of:=CONCATENATE(ROUND([.G24]/0.0254/12/5280);&quot; mi&quot;)" office:value-type="string" office:string-value="2052 mi" calcext:value-type="string">
            <text:p>2052 mi</text:p>
          </table:table-cell>
          <table:table-cell table:style-name="ce2" table:formula="of:=[.G24]*[.$C$9]" office:value-type="float" office:value="207463.050525142" calcext:value-type="float">
            <text:p>207,463.05</text:p>
          </table:table-cell>
          <table:table-cell table:style-name="ce2" table:formula="of:=CONCATENATE(ROUND([.I24]*3600/5280/0.0254/12);&quot; mph&quot;)" office:value-type="string" office:string-value="464082 mph" calcext:value-type="string">
            <text:p>464082 mph</text:p>
          </table:table-cell>
          <table:table-cell table:style-name="ce4" table:formula="of:=2*PI()*([.G24]+[.$B$2])/([.I24])/3600" office:value-type="float" office:value="0.0814341273833708" calcext:value-type="float">
            <text:p>0.08</text:p>
          </table:table-cell>
          <table:table-cell table:style-name="ce2"/>
          <table:table-cell table:style-name="ce2" table:formula="of:=1/(([.N24]*([.G24]+[.$B$2]))^0.5/(2*PI()*([.$B$2]+[.G24])))/3600" office:value-type="float" office:value="2.63125602298157" calcext:value-type="float">
            <text:p>2.63</text:p>
          </table:table-cell>
          <table:table-cell table:style-name="ce2" table:formula="of:=[.$E$2]/([.G24]+[.$B$2])^2" office:value-type="float" office:value="4.25890898878112" calcext:value-type="float">
            <text:p>4.26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2" table:formula="of:=ROUND(EXP([.F25]*[.$F$4]))+5" office:value-type="float" office:value="7275337" calcext:value-type="float">
            <text:p>7,275,337.00</text:p>
          </table:table-cell>
          <table:table-cell table:style-name="ce3" table:formula="of:=CONCATENATE(ROUND([.G25]/0.0254/12/5280);&quot; mi&quot;)" office:value-type="string" office:string-value="4521 mi" calcext:value-type="string">
            <text:p>4521 mi</text:p>
          </table:table-cell>
          <table:table-cell table:style-name="ce2" table:formula="of:=[.G25]*[.$C$9]" office:value-type="float" office:value="457122.9054318" calcext:value-type="float">
            <text:p>457,122.91</text:p>
          </table:table-cell>
          <table:table-cell table:style-name="ce2" table:formula="of:=CONCATENATE(ROUND([.I25]*3600/5280/0.0254/12);&quot; mph&quot;)" office:value-type="string" office:string-value="1022555 mph" calcext:value-type="string">
            <text:p>1022555 mph</text:p>
          </table:table-cell>
          <table:table-cell table:style-name="ce4" table:formula="of:=2*PI()*([.G25]+[.$B$2])/([.I25])/3600" office:value-type="float" office:value="0.0521294561490569" calcext:value-type="float">
            <text:p>0.05</text:p>
          </table:table-cell>
          <table:table-cell table:style-name="ce2"/>
          <table:table-cell table:style-name="ce2" table:formula="of:=1/(([.N25]*([.G25]+[.$B$2]))^0.5/(2*PI()*([.$B$2]+[.G25])))/3600" office:value-type="float" office:value="4.40774603883945" calcext:value-type="float">
            <text:p>4.41</text:p>
          </table:table-cell>
          <table:table-cell table:style-name="ce2" table:formula="of:=[.$E$2]/([.G25]+[.$B$2])^2" office:value-type="float" office:value="2.14072271544438" calcext:value-type="float">
            <text:p>2.14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style-name="ce2" table:formula="of:=ROUND(EXP([.F26]*[.$F$4]))+5" office:value-type="float" office:value="16030445" calcext:value-type="float">
            <text:p>16,030,445.00</text:p>
          </table:table-cell>
          <table:table-cell table:style-name="ce3" table:formula="of:=CONCATENATE(ROUND([.G26]/0.0254/12/5280/1000);&quot; thousand mi&quot;)" office:value-type="string" office:string-value="10 thousand mi" calcext:value-type="string">
            <text:p>10 thousand mi</text:p>
          </table:table-cell>
          <table:table-cell table:style-name="ce2" table:formula="of:=[.G26]*[.$C$9]" office:value-type="float" office:value="1007222.5649155" calcext:value-type="float">
            <text:p>1,007,222.56</text:p>
          </table:table-cell>
          <table:table-cell table:style-name="ce2" table:formula="of:=CONCATENATE(ROUND([.I26]*3600/5280/0.0254/12);&quot; mph&quot;)" office:value-type="string" office:string-value="2253093 mph" calcext:value-type="string">
            <text:p>2253093 mph</text:p>
          </table:table-cell>
          <table:table-cell table:style-name="ce4" table:formula="of:=2*PI()*([.G26]+[.$B$2])/([.I26])/3600" office:value-type="float" office:value="0.0388296647757162" calcext:value-type="float">
            <text:p>0.04</text:p>
          </table:table-cell>
          <table:table-cell table:style-name="ce2"/>
          <table:table-cell table:style-name="ce2" table:formula="of:=1/(([.N26]*([.G26]+[.$B$2]))^0.5/(2*PI()*([.$B$2]+[.G26])))/3600" office:value-type="float" office:value="9.2677845595954" calcext:value-type="float">
            <text:p>9.27</text:p>
          </table:table-cell>
          <table:table-cell table:style-name="ce2" table:formula="of:=[.$E$2]/([.G26]+[.$B$2])^2" office:value-type="float" office:value="0.794720830400967" calcext:value-type="float">
            <text:p>0.79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style-name="ce2" table:formula="of:=ROUND(EXP([.F27]*[.$F$4]))+5" office:value-type="float" office:value="35321420" calcext:value-type="float">
            <text:p>35,321,420.00</text:p>
          </table:table-cell>
          <table:table-cell table:style-name="ce3" table:formula="of:=CONCATENATE(ROUND([.G27]/0.0254/12/5280/1000);&quot; thousand mi&quot;)" office:value-type="string" office:string-value="22 thousand mi" calcext:value-type="string">
            <text:p>22 thousand mi</text:p>
          </table:table-cell>
          <table:table-cell table:style-name="ce2" table:formula="of:=[.G27]*[.$C$9]" office:value-type="float" office:value="2219310.27172719" calcext:value-type="float">
            <text:p>2,219,310.27</text:p>
          </table:table-cell>
          <table:table-cell table:style-name="ce2" table:formula="of:=CONCATENATE(ROUND([.I27]*3600/5280/0.0254/12);&quot; mph&quot;)" office:value-type="string" office:string-value="4964456 mph" calcext:value-type="string">
            <text:p>4964456 mph</text:p>
          </table:table-cell>
          <table:table-cell table:style-name="ce4" table:formula="of:=2*PI()*([.G27]+[.$B$2])/([.I27])/3600" office:value-type="float" office:value="0.0327936199117199" calcext:value-type="float">
            <text:p>0.03</text:p>
          </table:table-cell>
          <table:table-cell table:style-name="ce2"/>
          <table:table-cell table:style-name="ce2" table:formula="of:=1/(([.N27]*([.G27]+[.$B$2]))^0.5/(2*PI()*([.$B$2]+[.G27])))/3600" office:value-type="float" office:value="23.5262859081623" calcext:value-type="float">
            <text:p>23.53</text:p>
          </table:table-cell>
          <table:table-cell table:style-name="ce2" table:formula="of:=[.$E$2]/([.G27]+[.$B$2])^2" office:value-type="float" office:value="0.229497526132838" calcext:value-type="float">
            <text:p>0.23</text:p>
          </table:table-cell>
          <table:table-cell office:value-type="string" calcext:value-type="string">
            <text:p>Geostationary Orbit</text:p>
          </table:table-cell>
          <table:table-cell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style-name="ce2" table:formula="of:=ROUND(EXP([.F28]*[.$F$4]))+5" office:value-type="float" office:value="77827085" calcext:value-type="float">
            <text:p>77,827,085.00</text:p>
          </table:table-cell>
          <table:table-cell table:style-name="ce3" table:formula="of:=CONCATENATE(ROUND([.G28]/0.0254/12/5280/1000);&quot; thousand mi&quot;)" office:value-type="string" office:string-value="48 thousand mi" calcext:value-type="string">
            <text:p>48 thousand mi</text:p>
          </table:table-cell>
          <table:table-cell table:style-name="ce2" table:formula="of:=[.G28]*[.$C$9]" office:value-type="float" office:value="4890019.96972617" calcext:value-type="float">
            <text:p>4,890,019.97</text:p>
          </table:table-cell>
          <table:table-cell table:style-name="ce2" table:formula="of:=CONCATENATE(ROUND([.I28]*3600/5280/0.0254/12);&quot; mph&quot;)" office:value-type="string" office:string-value="10938663 mph" calcext:value-type="string">
            <text:p>10938663 mph</text:p>
          </table:table-cell>
          <table:table-cell table:style-name="ce4" table:formula="of:=2*PI()*([.G28]+[.$B$2])/([.I28])/3600" office:value-type="float" office:value="0.0300541917879732" calcext:value-type="float">
            <text:p>0.03</text:p>
          </table:table-cell>
          <table:table-cell table:style-name="ce2"/>
          <table:table-cell table:style-name="ce2" table:formula="of:=1/(([.N28]*([.G28]+[.$B$2]))^0.5/(2*PI()*([.$B$2]+[.G28])))/3600" office:value-type="float" office:value="67.5096454073654" calcext:value-type="float">
            <text:p>67.51</text:p>
          </table:table-cell>
          <table:table-cell table:style-name="ce2" table:formula="of:=[.$E$2]/([.G28]+[.$B$2])^2" office:value-type="float" office:value="0.0562809474700378" calcext:value-type="float">
            <text:p>0.06</text:p>
          </table:table-cell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style-name="ce2" table:formula="of:=ROUND(EXP([.F29]*[.$F$4]))+5" office:value-type="float" office:value="171483915" calcext:value-type="float">
            <text:p>171,483,915.00</text:p>
          </table:table-cell>
          <table:table-cell table:style-name="ce3" table:formula="of:=CONCATENATE(ROUND([.G29]/0.0254/12/5280/1000);&quot; thousand mi&quot;)" office:value-type="string" office:string-value="107 thousand mi" calcext:value-type="string">
            <text:p>107 thousand mi</text:p>
          </table:table-cell>
          <table:table-cell table:style-name="ce2" table:formula="of:=[.G29]*[.$C$9]" office:value-type="float" office:value="10774652.1514563" calcext:value-type="float">
            <text:p>10,774,652.15</text:p>
          </table:table-cell>
          <table:table-cell table:style-name="ce2" table:formula="of:=CONCATENATE(ROUND([.I29]*3600/5280/0.0254/12);&quot; mph&quot;)" office:value-type="string" office:string-value="24102210 mph" calcext:value-type="string">
            <text:p>24102210 mph</text:p>
          </table:table-cell>
          <table:table-cell table:style-name="ce4" table:formula="of:=2*PI()*([.G29]+[.$B$2])/([.I29])/3600" office:value-type="float" office:value="0.0288109164640894" calcext:value-type="float">
            <text:p>0.03</text:p>
          </table:table-cell>
          <table:table-cell table:style-name="ce2"/>
          <table:table-cell table:style-name="ce2" table:formula="of:=1/(([.N29]*([.G29]+[.$B$2]))^0.5/(2*PI()*([.$B$2]+[.G29])))/3600" office:value-type="float" office:value="207.244395573329" calcext:value-type="float">
            <text:p>207.24</text:p>
          </table:table-cell>
          <table:table-cell table:style-name="ce2" table:formula="of:=[.$E$2]/([.G29]+[.$B$2])^2" office:value-type="float" office:value="0.0126145600724693" calcext:value-type="float">
            <text:p>0.01</text:p>
          </table:table-cell>
          <table:table-cell table:number-columns-repeated="2"/>
          <table:table-cell table:style-name="ce1" table:number-columns-repeated="16368"/>
        </table:table-row>
        <table:table-row table:style-name="ro1" table:number-rows-repeated="5">
          <table:table-cell table:number-columns-repeated="6"/>
          <table:table-cell table:style-name="ce2"/>
          <table:table-cell table:style-name="ce3"/>
          <table:table-cell table:style-name="ce2" table:number-columns-repeated="6"/>
          <table:table-cell table:number-columns-repeated="2"/>
          <table:table-cell table:style-name="ce1" table:number-columns-repeated="16368"/>
        </table:table-row>
        <table:table-row table:style-name="ro1" table:number-rows-repeated="3">
          <table:table-cell table:number-columns-repeated="7"/>
          <table:table-cell table:style-name="ce3"/>
          <table:table-cell table:number-columns-repeated="8"/>
          <table:table-cell table:style-name="ce1" table:number-columns-repeated="16368"/>
        </table:table-row>
        <table:table-row table:style-name="ro1" table:number-rows-repeated="1048538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calcext:conditional-formats>
          <calcext:conditional-format calcext:target-range-address="Sheet1.K6:Sheet1.K29">
            <calcext:condition calcext:apply-style-name="Good" calcext:value="formula-is(INDIRECT(ADDRESS(ROW();COLUMN()))&lt;INDIRECT(ADDRESS(ROW();COLUMN()+2)))" calcext:base-cell-address="Sheet1.K6"/>
          </calcext:conditional-format>
          <calcext:conditional-format calcext:target-range-address="Sheet1.K6:Sheet1.K29">
            <calcext:condition calcext:apply-style-name="Bad" calcext:value="formula-is(INDIRECT(ADDRESS(ROW();COLUMN()))&gt;=INDIRECT(ADDRESS(ROW();COLUMN()+2)))" calcext:base-cell-address="Sheet1.K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3" number:min-decimal-places="3" number:min-integer-digits="1" number:grouping="true"/>
    </number:number-style>
    <number:number-style style:name="N142">
      <number:number number:decimal-places="4" number:min-decimal-places="4" number:min-integer-digits="1" number:grouping="true"/>
    </number:number-style>
    <number:number-style style:name="N143">
      <number:number number:decimal-places="5" number:min-decimal-places="5" number:min-integer-digits="1" number:grouping="true"/>
    </number:number-style>
    <number:number-style style:name="N144">
      <number:number number:decimal-places="6" number:min-decimal-places="6" number:min-integer-digits="1" number:grouping="true"/>
    </number:number-style>
    <number:number-style style:name="N145">
      <number:number number:decimal-places="7" number:min-decimal-places="7" number:min-integer-digits="1" number:grouping="true"/>
    </number:number-style>
    <number:number-style style:name="N146">
      <number:number number:decimal-places="8" number:min-decimal-places="8" number:min-integer-digits="1" number:grouping="true"/>
    </number:number-style>
    <number:number-style style:name="N147">
      <number:number number:decimal-places="9" number:min-decimal-places="9" number:min-integer-digits="1" number:grouping="true"/>
    </number:number-style>
    <number:number-style style:name="N148">
      <number:number number:decimal-places="10" number:min-decimal-places="10" number:min-integer-digits="1" number:grouping="true"/>
    </number:number-style>
    <number:number-style style:name="N149">
      <number:number number:decimal-places="11" number:min-decimal-places="11" number:min-integer-digits="1" number:grouping="true"/>
    </number:number-style>
    <number:number-style style:name="N150">
      <number:number number:decimal-places="12" number:min-decimal-places="1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9T12:50:55.973288500</meta:creation-date>
    <dc:date>2026-06-19T13:47:23.503934500</dc:date>
    <meta:editing-duration>PT34M11S</meta:editing-duration>
    <meta:editing-cycles>8</meta:editing-cycles>
    <meta:generator>LibreOffice/26.2.3.2$Windows_X86_64 LibreOffice_project/70e089b17412e4cb7773e41413306b17a2328c34</meta:generator>
    <meta:document-statistic meta:table-count="1" meta:cell-count="235" meta:object-count="0"/>
  </office:meta>
</office:document-meta>
</file>